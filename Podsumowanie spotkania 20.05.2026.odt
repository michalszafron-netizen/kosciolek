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DA000002A1CAF24CAD52C93058.png" manifest:media-type="image/png"/>
  <manifest:file-entry manifest:full-path="Pictures/10000201000004C8000001C1CFDA02609BCB38EF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6" style:family="paragraph" style:parent-style-name="Standard">
      <style:paragraph-properties fo:margin-left="0.5in" fo:margin-right="0in" fo:text-indent="0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P8" style:family="paragraph" style:parent-style-name="Heading_20_2" style:master-page-name="Standard">
      <style:paragraph-properties style:page-number="1"/>
    </style:style>
    <style:style style:name="T1" style:family="text">
      <style:text-properties style:text-underline-style="none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color="#1155cc"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juleh62pi63o"/>Menu</text:p>
      <text:list xml:id="list1458307958" text:style-name="WWNum1">
        <text:list-item>
          <text:p text:style-name="P1">Na czerwonym pasku zostawiamy tylko dane adresowe i kontaktowe + przycisk “wsparcie budowy” który przekierowuje na landinga. Sam przycisk w odwrotnych kolorach, czyli jasny przycisk i czerwony tekst na nim, żeby się wybijało na tym pasku. <text:line-break/>Kalendarz liturgiczny wrzucamy jako “msze święte” w menu (struktura menu poniżej).<text:line-break/>Intencje mszalne aktualnie to to samo co kontakt, więc do wywalenia. <text:line-break/></text:p>
        </text:list-item>
        <text:list-item>
          <text:p text:style-name="P1">Zmiana samej struktury menu:<text:line-break/>Strona główna | O kościele | Msze święte (czyli kalendarz liturgiczny) | Sakramenty | Cmentarz | Galeria | Aktualności | Kontakt<text:line-break/><text:line-break/>“O kościele” (rozwijane menu) i tam:<text:line-break/>- Kapłani (to co aktualnie wrzuciliście jako Duszpasterstwo)<text:line-break/>- Wspólnoty (to przenosi na podstronę, gdzie wybieramy konkretną grupę, jak na stronie - <text:a xlink:type="simple" xlink:href="https://katedrasosnowiecka.pl/grupy_duszpasterskie" text:style-name="ListLabel_20_46" text:visited-style-name="ListLabel_20_46"><text:span text:style-name="T2">https://katedrasosnowiecka.pl/grupy_duszpasterskie</text:span></text:a> )<text:line-break/>- Historia<text:line-break/>- Standardy ochrony małoletnich (to jest na stronie i trzeba przenieść, bo to must have ponoć)<text:line-break/><text:line-break/>“Sakramenty” (rozwijane menu) i tam:<text:line-break/>- chrzest<text:line-break/>- komunia<text:line-break/>- bierzmowanie<text:line-break/>- ślub<text:line-break/>- namaszczenie chorych<text:line-break/>- pogrzeb<text:line-break/>- spowiedź<text:line-break/><text:line-break/>Aktualnie jest to w <text:a xlink:type="simple" xlink:href="https://www.nspjczerwionka.pl/duszpasterstwo/sakramenty-swiete.html" text:style-name="ListLabel_20_46" text:visited-style-name="ListLabel_20_46"><text:span text:style-name="T2">https://www.nspjczerwionka.pl/duszpasterstwo/sakramenty-swiete.html</text:span></text:a> ale rozbijemy to na pojedyncze, krótkie podstrony (rozpisane poniżej).</text:p>
        </text:list-item>
      </text:list>
      <text:p text:style-name="P6"/>
      <text:p text:style-name="Heading_20_2"><text:bookmark text:name="_vqpzaanqkmfo"/>Strona główna</text:p>
      <text:list xml:id="list4124812110" text:style-name="WWNum2">
        <text:list-item>
          <text:p text:style-name="P2">Dodatkowa sekcja - pomiędzy “Ogłoszenia” a “galeria parafii” wrzucamy kalendarz z intencjami.</text:p>
        </text:list-item>
        <text:list-item>
          <text:p text:style-name="P2">Do zmiany ikony/miniatury we wspólnotach - trochę średnio pasują. Może coś z <text:a xlink:type="simple" xlink:href="https://www.flaticon.com/" text:style-name="ListLabel_20_46" text:visited-style-name="ListLabel_20_46"><text:span text:style-name="T2">https://www.flaticon.com/</text:span></text:a> :<text:line-break/><draw:frame draw:style-name="fr1" draw:name="image1.png" text:anchor-type="as-char" svg:width="6.2681in" svg:height="2.3055in" draw:z-index="0"><draw:image xlink:href="Pictures/10000201000004C8000001C1CFDA02609BCB38EF.png" xlink:type="simple" xlink:show="embed" xlink:actuate="onLoad" loext:mime-type="image/png"/></draw:frame></text:p>
        </text:list-item>
      </text:list>
      <text:p text:style-name="P7"/>
      <text:p text:style-name="P7"/>
      <text:p text:style-name="Heading_20_2"><text:bookmark text:name="_9yfakg4m840o"/>Stopka</text:p>
      <text:list xml:id="list2742061844" text:style-name="WWNum4">
        <text:list-item>
          <text:p text:style-name="P3">Social Media do dodania w stopce - facebook i instagram<text:line-break/></text:p>
        </text:list-item>
      </text:list>
      <text:p text:style-name="Heading_20_2"><text:bookmark text:name="_wa965lirocyo"/>Sakramenty - podstrony</text:p>
      <text:p text:style-name="Heading_20_3"><text:bookmark text:name="_746ogdydnefd"/>Sakrament Chrztu Świętego </text:p>
      <text:p text:style-name="Standard">Termin - druga niedziela miesiąca</text:p>
      <text:p text:style-name="Standard"><text:line-break/>Dokumenty:</text:p>
      <text:p text:style-name="Standard">- Dokument potwierdzający urodzenie dziecka z Urzędu Stanu Cywilnego</text:p>
      <text:p text:style-name="Standard">- Akt zgłoszenia dziecka do chrztu - dokument otrzymuje się przy zgłoszeniu dziecka do chrztu.</text:p>
      <text:p text:style-name="Standard"/>
      <text:p text:style-name="Standard">Wymagania:</text:p>
      <text:p text:style-name="P7">- Zgłoszenie dziecka do chrztu minimum dwa tygodnie przed planowanym chrztem (jeden z rodziców osobiście w kancelarii)</text:p>
      <text:p text:style-name="Standard">- Nauka przed chrztem - sobota przed niedzielą chrztu dziecka (rodzice i chrzestni)</text:p>
      <text:p text:style-name="Standard">- Rodzice chrzestni - zaświadczenie z parafii zamieszkania, że są katolikami (dostarczyć w dniu nauk przed chrztem)</text:p>
      <text:p text:style-name="Standard"/>
      <text:p text:style-name="Heading_20_3"><text:bookmark text:name="_uk7a7x10xewl"/>Pierwsza Komunia Święta </text:p>
      <text:p text:style-name="Standard">Termin - trzecia niedziela maja</text:p>
      <text:p text:style-name="Standard"><text:soft-page-break/></text:p>
      <text:p text:style-name="Standard">Dokumenty:</text:p>
      <text:p text:style-name="Standard">- Akt chrztu z Parafii, w której Chrztu udzielono</text:p>
      <text:p text:style-name="Standard"/>
      <text:p text:style-name="Standard">Wymagania:</text:p>
      <text:p text:style-name="Standard">- Zgłoszenie w Parafii dziecka do Komunii we wrześniu roku poprzedzającego Komunię (ten sam rok szkolny) - (jeden z rodziców osobiście w kancelarii)<text:line-break/>- Udział dziecka w katechezie w szkole</text:p>
      <text:p text:style-name="Standard">- Comiesięczne spotkania przy parafii - dziecko wraz z rodzicami</text:p>
      <text:p text:style-name="Standard"/>
      <text:p text:style-name="Heading_20_3"><text:bookmark text:name="_dhwer2rksowe"/>Sakrament Bierzmowania</text:p>
      <text:p text:style-name="Standard">Dokumenty:</text:p>
      <text:p text:style-name="Standard">- Akt chrztu z Parafii, w której Chrztu udzielono</text:p>
      <text:p text:style-name="Standard"/>
      <text:p text:style-name="Standard">Wymagania:<text:line-break/>- Zgłoszenie w Parafii dziecka do Bierzmowania we wrześniu roku poprzedzającego Komunię (ten sam rok szkolny) - (jeden z rodziców osobiście w kancelarii)<text:line-break/>- Uczestnictwo dziecka w niedzielnej Mszy św.</text:p>
      <text:p text:style-name="Standard">- Pozytywna opinia katechety</text:p>
      <text:p text:style-name="Standard">- Uczestnictwo dziecka w Mszy św. i spotkaniu (pierwszy piątek miesiąca)</text:p>
      <text:p text:style-name="Standard">- Kompletny indeks (indeks otrzymuje się na pierwszym spotkaniu)</text:p>
      <text:p text:style-name="Heading_20_3"><text:bookmark text:name="_lsb90y84zdqo"/>Sakrament Małżeństwa</text:p>
      <text:p text:style-name="Standard">Dokumenty: </text:p>
      <text:p text:style-name="Standard">- W Parafii, w której Chrztu udzielono należy pobrać akt Chrztu, na którym widnieje także informacja o bierzmowaniu - data wystawienia mniej niż 6 miesięcy od planowanego terminu ślubu</text:p>
      <text:p text:style-name="Standard">- Zaświadczenie z Urzędu Stanu Cywilnego (przy ślubie konkordatowym)</text:p>
      <text:p text:style-name="Standard">- Dowód osobisty</text:p>
      <text:p text:style-name="Standard">- Ostatnie świadectwo katechizacji – szkoły ponadpodstawowej (liceum, technikum, szkoła zawodowa)</text:p>
      <text:p text:style-name="Standard"/>
      <text:p text:style-name="Standard">Wymagania:</text:p>
      <text:p text:style-name="Standard">- Uczestnictwo w naukach przedślubnych</text:p>
      <text:p text:style-name="Standard">- Ukończenie kursu w Poradni Życia Małżeńskiego (placówka do wyboru <text:span text:style-name="T4">[link - </text:span><text:a xlink:type="simple" xlink:href="https://fundacjarjn.pl/" text:style-name="ListLabel_20_47" text:visited-style-name="ListLabel_20_47"><text:span text:style-name="T3">https://fundacjarjn.pl/</text:span></text:a><text:span text:style-name="T4"> ]</text:span>)</text:p>
      <text:p text:style-name="Standard"><text:soft-page-break/>- Wygłoszenie zapowiedzi przedślubnych w Parafii zamieszkania </text:p>
      <text:p text:style-name="Standard"/>
      <text:p text:style-name="Standard"/>
      <text:p text:style-name="Heading_20_3"><text:bookmark text:name="_5jponihocg6c"/>Sakrament Chorych - wizyta u chorego </text:p>
      <text:p text:style-name="Standard">Termin - pierwsza sobota miesiąca</text:p>
      <text:p text:style-name="Standard"><text:line-break/>Wymagania:<text:line-break/>- zgłoszenie telefoniczne lub w zakrystii - przez chorego, opiekuna lub rodzinę</text:p>
      <text:p text:style-name="Standard"/>
      <text:p text:style-name="Heading_20_3"><text:bookmark text:name="_6ikbrbn0ztls"/>Pogrzeb</text:p>
      <text:p text:style-name="Standard">dokumenty:<text:line-break/>- akt zgonu z Urzędu Stanu Cywilnego</text:p>
      <text:p text:style-name="Standard">- dokument dla Administracji Cmentarza z Urzędu Stanu Cywilnego </text:p>
      <text:p text:style-name="Standard"><text:line-break/>wymagania:</text:p>
      <text:p text:style-name="Standard">- W przypadku, gdy osoba zmarła nie należała do naszej parafii, a pogrzeb jak i pochówek mają odbyć się w tutejszej parafii, konieczna jest zgoda ks. proboszcza z parafii zamieszkania zmarłego</text:p>
      <text:p text:style-name="Heading_20_3"><text:bookmark text:name="_valeafof3uob"/>Spowiedź</text:p>
      <text:p text:style-name="Standard">20 minut przed każdą Mszą Świętą - jeżeli nie ma dodatkowych Nabożeństw. </text:p>
      <text:p text:style-name="Standard">W pierwszy piątek miesiąca od 16:00 do 17:00.</text:p>
      <text:p text:style-name="Standard"/>
      <text:p text:style-name="Standard"><text:span text:style-name="T4">[Spowiedź oprócz tego, że jest w sakramentach, to jeszcze przy mszach żeby widniało.]</text:span></text:p>
      <text:p text:style-name="Standard"/>
      <text:p text:style-name="Standard"/>
      <text:p text:style-name="Heading_20_2"><text:bookmark text:name="_48h9vqjy011i"/>Aktualności</text:p>
      <text:p text:style-name="Standard">Na podstronie “aktualności” pierwszą aktualnością zawsze są aktualne ogłoszenia parafialne, bo to główny news - tak jak to jest na stronie głównej teraz zrobione.<text:line-break/><text:line-break/><draw:frame draw:style-name="fr1" draw:name="image2.png" text:anchor-type="as-char" svg:width="6.2681in" svg:height="3.4028in" draw:z-index="0"><draw:image xlink:href="Pictures/10000201000004DA000002A1CAF24CAD52C93058.png" xlink:type="simple" xlink:show="embed" xlink:actuate="onLoad" loext:mime-type="image/png"/></draw:frame><text:line-break/><text:line-break/></text:p>
      <text:p text:style-name="Standard"/>
      <text:p text:style-name="Standard"/>
      <text:p text:style-name="Standard"/>
      <text:p text:style-name="Standard"/>
      <text:p text:style-name="Heading_20_2"><text:bookmark text:name="_9ed9624605bv"/>System do zarządzania</text:p>
      <text:list xml:id="list3754536217" text:style-name="WWNum5">
        <text:list-item>
          <text:p text:style-name="P4"><text:soft-page-break/>Intencje mszalne -&gt; tam gdzie wybiera się “typ” -&gt; jeden + za zmarłego, ++ za zmarłych</text:p>
        </text:list-item>
        <text:list-item>
          <text:p text:style-name="P4">Aktualności - jest opcja, żeby na podstawie wprowadzonej treści SEO robiło się z automatu? </text:p>
        </text:list-item>
      </text:list>
      <text:p text:style-name="P6"/>
      <text:p text:style-name="Standard">Oprócz tego będziemy mieć parafian i sakramenty. Finalnie dobrze by było, żeby dokumenty, które są potrzebne generowały się z automatu. Czyli mamy szablon, a z bazy danych zaciągają się dane do druku. </text:p>
      <text:p text:style-name="Standard"/>
      <text:p text:style-name="Standard">Skany wszystkich dokumentów w linku - <text:a xlink:type="simple" xlink:href="https://drive.google.com/file/d/19XmMkWds8Y2auUAC5yqr0m3EPzBeOpac/view?usp=sharing" text:style-name="ListLabel_20_46" text:visited-style-name="ListLabel_20_46"><text:span text:style-name="T2">https://drive.google.com/file/d/19XmMkWds8Y2auUAC5yqr0m3EPzBeOpac/view?usp=sharing</text:span></text:a> </text:p>
      <text:p text:style-name="Standard"><text:line-break/></text:p>
      <text:p text:style-name="Standard">Przy danych odnośnie parafian i sakramentów, to oprócz standardowych pól na pewno musimy mieć:<text:line-break/>- W bierzmowaniu i ślubie - miejsce ślubu/bierzmowania</text:p>
      <text:p text:style-name="Standard">- Akt chrztu - Rok i nr księgi ochrzczonych - rok, strona, nr </text:p>
      <text:p text:style-name="Standard">- Zgłoszenie pogrzebu - połączone z systemem od cmentarzy, żeby się automatycznie zaktualizowało, do którego grobu trafi konkretna osoba<text:line-break/>- Księga grobów z “cmentarz” eksport na koniec roku z aktualną bazą - czyli możliwość wydruku bazy danych</text:p>
      <text:p text:style-name="Standard"/>
      <text:p text:style-name="Heading_20_2"><text:bookmark text:name="_sw7tsgpy59j6"/>Dodatkowe info</text:p>
      <text:list xml:id="list266725251" text:style-name="WWNum3">
        <text:list-item>
          <text:p text:style-name="P5">Intencje mszalne i msze - nie chce zamawiania online, bo mają przyjść do kancelarii. Docelowo dałbym taką opcję, ale u niego po prostu będzie nieaktywna - miejmy to na uwadze przy projektowaniu systemu<text:line-break/></text:p>
        </text:list-item>
        <text:list-item>
          <text:p text:style-name="P5">Uruchomienie strony - 1 września, do tego czasu musimy mieć dopięte wszystko na ostatni guzik, wraz z cmentarzami (przeniesienie bazy z aktualnego systemu do nas). W międzyczasie jak będzie już front kościoła i ogarnięte obejście, to zrobimy foty.<text:line-break/></text:p>
        </text:list-item>
        <text:list-item>
          <text:p text:style-name="P5">Dowiedziałem się o innym systemie do zarządzania kościołem, ale wygląda jakby UX im robili Ci od strony ZUSu xD - <text:a xlink:type="simple" xlink:href="https://fara.pl/" text:style-name="ListLabel_20_46" text:visited-style-name="ListLabel_20_46"><text:span text:style-name="T2">https://fara.pl/</text:span></text:a> <text:line-break/></text:p>
        </text:list-item>
        <text:list-item>
          <text:p text:style-name="P5">Robimy jeden pakiet cenowy - pełna wersja ze wszystkimi funkcjonalnościami. Księża to laicy i nie rozumieją na początkowym etapie co im może być potrzebne, a później mają opory żeby zwiększać plan na wyższy. W związku z tym full pakiet w jednej opcji + cmentarze osobno jako system (no i wdrożenie cmentarzy tzn. inwentaryzacja też osobno)</text:p>
        </text:list-item>
      </text:list>
      <text:p text:style-name="Standard"/>
      <text:p text:style-name="Standard"/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7" style:display-name="ListLabel 47" style:family="text">
      <style:text-properties fo:color="#1155cc" fo:font-style="italic" style:text-underline-style="solid" style:text-underline-width="auto" style:text-underline-color="font-color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4" meta:paragraph-count="71" meta:word-count="933" meta:character-count="6277" meta:non-whitespace-character-count="5391"/>
    <meta:generator>LibreOfficeDev/6.0.5.2$Linux_X86_64 LibreOffice_project/</meta:generator>
  </office:meta>
</office:document-meta>
</file>